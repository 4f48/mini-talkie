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2.2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2472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4.7756in"/>
    </style:style>
    <style:style style:name="co11" style:family="table-column">
      <style:table-column-properties fo:break-before="auto" style:column-width="6.3626in"/>
    </style:style>
    <style:style style:name="co12" style:family="table-column">
      <style:table-column-properties fo:break-before="auto" style:column-width="1.4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0603 2.2 µF capacitor</text:p>
          </table:table-cell>
          <table:table-cell office:value-type="string" calcext:value-type="string">
            <text:p>CC0603KRX7R5BB225</text:p>
          </table:table-cell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hu/short/4rjpq33n" xlink:type="simple">https://www.digikey.hu/short/4rjpq33n</text:a></text:p>
          </table:table-cell>
        </table:table-row>
        <table:table-row table:style-name="ro1">
          <table:table-cell office:value-type="string" calcext:value-type="string">
            <text:p>0603 100 nF capacitor</text:p>
          </table:table-cell>
          <table:table-cell office:value-type="string" calcext:value-type="string">
            <text:p>CC0603KRX7R5BB104</text:p>
          </table:table-cell>
          <table:table-cell office:value-type="string" calcext:value-type="string">
            <text:p>C3,C4,C5,C6,C7,C9,C14,C18,C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digikey.hu/short/dt7hb4qj" xlink:type="simple">https://www.digikey.hu/short/dt7hb4qj</text:a></text:p>
          </table:table-cell>
        </table:table-row>
        <table:table-row table:style-name="ro1">
          <table:table-cell office:value-type="string" calcext:value-type="string">
            <text:p><text:span text:style-name="T1">0805 10 µ</text:span>F capacitor</text:p>
          </table:table-cell>
          <table:table-cell office:value-type="string" calcext:value-type="string">
            <text:p>CL21A106KQFNNNG</text:p>
          </table:table-cell>
          <table:table-cell office:value-type="string" calcext:value-type="string">
            <text:p>C8,C10,C11,C12,C13,C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digikey.hu/short/tvz058r0" xlink:type="simple">https://www.digikey.hu/short/tvz058r0</text:a></text:p>
          </table:table-cell>
        </table:table-row>
        <table:table-row table:style-name="ro1">
          <table:table-cell office:value-type="string" calcext:value-type="string">
            <text:p>0603 1 µF capacitor</text:p>
          </table:table-cell>
          <table:table-cell office:value-type="string" calcext:value-type="string">
            <text:p>CL10A105KQ8NNNC</text:p>
          </table:table-cell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hu/short/z9n48j83" xlink:type="simple">https://www.digikey.hu/short/z9n48j83</text:a></text:p>
          </table:table-cell>
        </table:table-row>
        <table:table-row table:style-name="ro1">
          <table:table-cell office:value-type="string" calcext:value-type="string">
            <text:p>0603 10 µF capacitor</text:p>
          </table:table-cell>
          <table:table-cell office:value-type="string" calcext:value-type="string">
            <text:p>GRM188R60J106KE47D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j9w29qw" xlink:type="simple">https://www.digikey.hu/short/4j9w29qw</text:a></text:p>
          </table:table-cell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B0520WS-7-F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ht5bt73v" xlink:type="simple">https://www.digikey.hu/short/ht5bt73v</text:a></text:p>
          </table:table-cell>
        </table:table-row>
        <table:table-row table:style-name="ro1">
          <table:table-cell office:value-type="string" calcext:value-type="string">
            <text:p>0805 orange LED</text:p>
          </table:table-cell>
          <table:table-cell office:value-type="string" calcext:value-type="string">
            <text:p>LTST-C170KFKT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5p872b7" xlink:type="simple">https://www.digikey.hu/short/45p872b7</text:a></text:p>
          </table:table-cell>
        </table:table-row>
        <table:table-row table:style-name="ro1">
          <table:table-cell office:value-type="string" calcext:value-type="string">
            <text:p>0603 ferrite bead 600 Ω @100 MHz</text:p>
          </table:table-cell>
          <table:table-cell office:value-type="string" calcext:value-type="string">
            <text:p>BLM18KG601SN1D</text:p>
          </table:table-cell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0mqd98np" xlink:type="simple">https://www.digikey.hu/short/0mqd98np</text:a></text:p>
          </table:table-cell>
        </table:table-row>
        <table:table-row table:style-name="ro1">
          <table:table-cell office:value-type="string" calcext:value-type="string">
            <text:p>SWD connector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5p581w55" xlink:type="simple">https://www.digikey.hu/short/5p581w55</text:a></text:p>
          </table:table-cell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b77q7dpn" xlink:type="simple">https://www.digikey.hu/short/b77q7dpn</text:a></text:p>
          </table:table-cell>
        </table:table-row>
        <table:table-row table:style-name="ro1">
          <table:table-cell office:value-type="string" calcext:value-type="string">
            <text:p>battery connector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j185jz8" xlink:type="simple">https://www.digikey.hu/short/4j185jz8</text:a></text:p>
          </table:table-cell>
        </table:table-row>
        <table:table-row table:style-name="ro1">
          <table:table-cell office:value-type="string" calcext:value-type="string">
            <text:p>speaker connector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j185jz8" xlink:type="simple">https://www.digikey.hu/short/4j185jz8</text:a>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TOW-3050P-B-R</text:p>
          </table:table-cell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pvdf25rr" xlink:type="simple">https://www.digikey.hu/short/pvdf25rr</text:a>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8rwf7289" xlink:type="simple">https://www.digikey.hu/short/8rwf7289</text:a></text:p>
          </table:table-cell>
        </table:table-row>
        <table:table-row table:style-name="ro1">
          <table:table-cell office:value-type="string" calcext:value-type="string">
            <text:p>0603 10 kΩ resistor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1,R4,R5,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hu/short/b31dpcpj" xlink:type="simple">https://www.digikey.hu/short/b31dpcpj</text:a></text:p>
          </table:table-cell>
        </table:table-row>
        <table:table-row table:style-name="ro1">
          <table:table-cell office:value-type="string" calcext:value-type="string">
            <text:p>0603 5.1 kΩ resistor</text:p>
          </table:table-cell>
          <table:table-cell office:value-type="string" calcext:value-type="string">
            <text:p>RC0603FR-075K1L</text:p>
          </table:table-cell>
          <table:table-cell office:value-type="string" calcext:value-type="string">
            <text:p>R2,R3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hu/short/q0d4nh3t" xlink:type="simple">https://www.digikey.hu/short/q0d4nh3t</text:a></text:p>
          </table:table-cell>
        </table:table-row>
        <table:table-row table:style-name="ro1">
          <table:table-cell office:value-type="string" calcext:value-type="string">
            <text:p>0805 1 kΩ resistor</text:p>
          </table:table-cell>
          <table:table-cell office:value-type="string" calcext:value-type="string">
            <text:p>ESR10EZPF1001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5hnt9d3r" xlink:type="simple">https://www.digikey.hu/short/5hnt9d3r</text:a></text:p>
          </table:table-cell>
        </table:table-row>
        <table:table-row table:style-name="ro1">
          <table:table-cell office:value-type="string" calcext:value-type="string">
            <text:p>SP3T sliding right-angle switch</text:p>
          </table:table-cell>
          <table:table-cell office:value-type="string" calcext:value-type="string">
            <text:p>OS103011MA7QP1C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jz8f2558" xlink:type="simple">https://www.digikey.hu/short/jz8f2558</text:a></text:p>
          </table:table-cell>
        </table:table-row>
        <table:table-row table:style-name="ro1">
          <table:table-cell office:value-type="string" calcext:value-type="string">
            <text:p>SPDT sliding right-angle switch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1v0t4jtn" xlink:type="simple">https://www.digikey.hu/short/1v0t4jtn</text:a></text:p>
          </table:table-cell>
        </table:table-row>
        <table:table-row table:style-name="ro1">
          <table:table-cell office:value-type="string" calcext:value-type="string">
            <text:p>SPST right-angle pushbutton switch</text:p>
          </table:table-cell>
          <table:table-cell office:value-type="string" calcext:value-type="string">
            <text:p>B3F-3152</text:p>
          </table:table-cell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0rj93f0h" xlink:type="simple">https://www.digikey.hu/short/0rj93f0h</text:a>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32H503CBT6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n7f3hf4p" xlink:type="simple">https://www.digikey.hu/short/n7f3hf4p</text:a></text:p>
          </table:table-cell>
        </table:table-row>
        <table:table-row table:style-name="ro1">
          <table:table-cell office:value-type="string" calcext:value-type="string">
            <text:p>LoRa chipset</text:p>
          </table:table-cell>
          <table:table-cell office:value-type="string" calcext:value-type="string">
            <text:p>114993390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prpdvndd" xlink:type="simple">https://www.digikey.hu/short/prpdvndd</text:a></text:p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PAM8302AASCR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0pzv4hpb" xlink:type="simple">https://www.digikey.hu/short/0pzv4hpb</text:a></text:p>
          </table:table-cell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wfqbhvzq" xlink:type="simple">https://www.digikey.hu/short/wfqbhvzq</text:a></text:p>
          </table:table-cell>
        </table:table-row>
        <table:table-row table:style-name="ro1">
          <table:table-cell office:value-type="string" calcext:value-type="string">
            <text:p>3.3V LDO voltage regulator</text:p>
          </table:table-cell>
          <table:table-cell office:value-type="string" calcext:value-type="string">
            <text:p>RT9080-33GJ5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2h9019td" xlink:type="simple">https://www.digikey.hu/short/2h9019td</text:a>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42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59fcjjq4" xlink:type="simple">https://www.digikey.hu/short/59fcjjq4</text:a>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GHX-325ASA3B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fqjjtd0b" xlink:type="simple">https://www.digikey.hu/short/fqjjtd0b</text:a></text:p>
          </table:table-cell>
        </table:table-row>
        <table:table-row table:style-name="ro1">
          <table:table-cell office:value-type="string" calcext:value-type="string">
            <text:p>antenna cable</text:p>
          </table:table-cell>
          <table:table-cell office:value-type="string" calcext:value-type="string">
            <text:p>185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jn7jd79m" xlink:type="simple">https://www.digikey.hu/short/jn7jd79m</text:a>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KY06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me.eu/hu/details/aky-lp883440/akkumulatorok/akyga-battery/aky0622/" xlink:type="simple">https://www.tme.eu/hu/details/aky-lp883440/akkumulatorok/akyga-battery/aky0622/</text:a></text:p>
          </table:table-cell>
        </table:table-row>
        <table:table-row table:style-name="ro1">
          <table:table-cell office:value-type="string" calcext:value-type="string">
            <text:p>2-pin JST PH cable</text:p>
          </table:table-cell>
          <table:table-cell office:value-type="string" calcext:value-type="string">
            <text:p>471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8mm8t1d7" xlink:type="simple">https://www.digikey.hu/short/8mm8t1d7</text:a></text:p>
          </table:table-cell>
        </table:table-row>
      </table:table>
      <table:table table:name="bom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C4,C5,C6,C7,C9,C14,C18,C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C10,C11,C12,C13,C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805_2012Metric_Pad1.18x1.4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3020EH</text:p>
          </table:table-cell>
          <table:table-cell table:number-columns-repeated="3"/>
          <table:table-cell office:value-type="string" calcext:value-type="string">
            <text:p>Diode_SMD:D_SMA_Handsoldering</text:p>
          </table:table-cell>
          <table:table-cell office:value-type="string" calcext:value-type="string">
            <text:p>https://assets.nexperia.com/documents/data-sheet/PMEG3020EH_EJ.pdf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LED_SMD:LED_0805_2012Metric_Pad1.15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@100</text:p>
          </table:table-cell>
          <table:table-cell table:number-columns-repeated="3"/>
          <table:table-cell office:value-type="string" calcext:value-type="string">
            <text:p>Inductor_SMD:L_0603_1608Metric_Pad1.05x0.95mm_HandSolder</text:p>
          </table:table-cell>
          <table:table-cell/>
          <table:table-cell office:value-type="string" calcext:value-type="string">
            <text:p>BLM18KG601SN1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number-columns-repeated="3"/>
          <table:table-cell office:value-type="string" calcext:value-type="string">
            <text:p>Connector_JST:JST_SH_BM03B-SRSS-TB_1x03-1MP_P1.00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table:number-columns-repeated="3"/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3"/>
          <table:table-cell office:value-type="string" calcext:value-type="string">
            <text:p>Connector_JST:JST_PH_S2B-PH-K_1x02_P2.00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3"/>
          <table:table-cell office:value-type="string" calcext:value-type="string">
            <text:p>Connector_JST:JST_PH_S2B-PH-K_1x02_P2.00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table:number-columns-repeated="3"/>
          <table:table-cell office:value-type="string" calcext:value-type="string">
            <text:p>Mini_Talkie:PUI_THT-2</text:p>
          </table:table-cell>
          <table:table-cell office:value-type="string" calcext:value-type="string">
            <text:p>https://mm.digikey.com/Volume0/opasdata/d220001/medias/docus/5883/TOW-3050P-B-R.pdf</text:p>
          </table:table-cell>
          <table:table-cell office:value-type="string" calcext:value-type="string">
            <text:p>TOW-3050P-B-R 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table:number-columns-repeated="3"/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aosmd.com/pdfs/datasheet/AO3401A.pdf</text:p>
          </table:table-cell>
          <table:table-cell/>
        </table:table-row>
        <table:table-row table:style-name="ro1">
          <table:table-cell office:value-type="string" calcext:value-type="string">
            <text:p>R1,R4,R5,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3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table:number-columns-repeated="3"/>
          <table:table-cell office:value-type="string" calcext:value-type="string">
            <text:p>Mini_Talkie:CK_SW_SP3T_OS103011MA7QP1C</text:p>
          </table:table-cell>
          <table:table-cell/>
          <table:table-cell office:value-type="string" calcext:value-type="string">
            <text:p>OS103011MA7QP1C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table:number-columns-repeated="3"/>
          <table:table-cell office:value-type="string" calcext:value-type="string">
            <text:p>Button_Switch_THT:SW_Slide_SPDT_Angled_CK_OS102011MA1Q</text:p>
          </table:table-cell>
          <table:table-cell/>
          <table:table-cell office:value-type="string" calcext:value-type="string">
            <text:p>OS102011MA1QN1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table:number-columns-repeated="3"/>
          <table:table-cell office:value-type="string" calcext:value-type="string">
            <text:p>Button_Switch_THT:SW_SPST_Omron_B3F-315x_Angled</text:p>
          </table:table-cell>
          <table:table-cell/>
          <table:table-cell office:value-type="string" calcext:value-type="string">
            <text:p>B3F-315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503CBTx</text:p>
          </table:table-cell>
          <table:table-cell table:number-columns-repeated="3"/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s://www.st.com/resource/en/datasheet/stm32h503cb.pdf</text:p>
          </table:table-cell>
          <table:table-cell office:value-type="string" calcext:value-type="string">
            <text:p>STM32H503CBT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o-SX1262</text:p>
          </table:table-cell>
          <table:table-cell table:number-columns-repeated="3"/>
          <table:table-cell office:value-type="string" calcext:value-type="string">
            <text:p>Mini_Talkie:Seeed_SMD-12</text:p>
          </table:table-cell>
          <table:table-cell office:value-type="string" calcext:value-type="string">
            <text:p>https://files.seeedstudio.com/products/SenseCAP/Wio_SX1262/Wio-SX1262_Module_Datasheet.pdf</text:p>
          </table:table-cell>
          <table:table-cell office:value-type="float" office:value="114993390" calcext:value-type="float">
            <text:p>11499339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8302AAS</text:p>
          </table:table-cell>
          <table:table-cell table:number-columns-repeated="3"/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s://www.diodes.com/assets/Datasheets/PAM8302A.pdf</text:p>
          </table:table-cell>
          <table:table-cell office:value-type="string" calcext:value-type="string">
            <text:p>PAM8302AASC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table:number-columns-repeated="3"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office:value-type="string" calcext:value-type="string">
            <text:p>MCP73831T-2ACI/OT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9080</text:p>
          </table:table-cell>
          <table:table-cell table:number-columns-repeated="3"/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s://www.richtek.com/SaveDownload.aspx?specid=RT9080</text:p>
          </table:table-cell>
          <table:table-cell office:value-type="string" calcext:value-type="string">
            <text:p>RT9080-33GJ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6:52:57.923492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dc:date>2026-06-03T17:54:42.177828247</dc:date>
    <meta:editing-duration>PT1H12M49S</meta:editing-duration>
    <meta:editing-cycles>129</meta:editing-cycles>
    <meta:document-statistic meta:table-count="2" meta:cell-count="283" meta:object-count="0"/>
  </office:meta>
</office:document-meta>
</file>